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3986in"/>
    </style:style>
    <style:style style:name="Table1.B" style:family="table-column">
      <style:table-column-properties style:column-width="0.9396in"/>
    </style:style>
    <style:style style:name="Table1.C" style:family="table-column">
      <style:table-column-properties style:column-width="1.7639in"/>
    </style:style>
    <style:style style:name="Table1.D" style:family="table-column">
      <style:table-column-properties style:column-width="2.3417in"/>
    </style:style>
    <style:style style:name="Table1.E" style:family="table-column">
      <style:table-column-properties style:column-width="1.4813in"/>
    </style:style>
    <style:style style:name="Table1.A1" style:family="table-cell">
      <style:table-cell-properties style:vertical-align="middle" fo:padding="0.0194in" fo:border="0.05pt solid #000000"/>
    </style:style>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3"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6"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7" style:family="paragraph" style:parent-style-name="Heading_20_4">
      <style:paragraph-properties fo:margin-left="0in" fo:margin-right="0in" fo:margin-top="0in" fo:margin-bottom="0.0972in" style:contextual-spacing="false" fo:line-height="114%" fo:text-indent="0in" style:auto-text-indent="false"/>
      <style:text-properties style:font-name="Google Sans"/>
    </style:style>
    <style:style style:name="P8"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9" style:family="paragraph" style:parent-style-name="Text_20_body">
      <style:paragraph-properties fo:margin-left="0in" fo:margin-right="0in" fo:margin-top="0in" fo:margin-bottom="0.0972in" style:contextual-spacing="false" fo:line-height="114%" fo:text-indent="0in" style:auto-text-indent="false"/>
    </style:style>
    <style:style style:name="P10"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11"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12"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P14"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5"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6"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17"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style>
    <style:style style:name="P18" style:family="paragraph" style:parent-style-name="Table_20_Contents">
      <style:paragraph-properties fo:margin-left="0in" fo:margin-right="0in" fo:margin-top="0in" fo:margin-bottom="0in" style:contextual-spacing="false" fo:line-height="114%" fo:text-indent="0in" style:auto-text-indent="false"/>
    </style:style>
    <style:style style:name="P1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20"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21" style:family="paragraph" style:parent-style-name="Table_20_Contents">
      <style:paragraph-properties fo:margin-left="0in" fo:margin-right="0in" fo:margin-top="0in" fo:margin-bottom="0.0972in" style:contextual-spacing="false" fo:line-height="114%" fo:text-indent="0in" style:auto-text-indent="false"/>
    </style:style>
    <style:style style:name="P22" style:family="paragraph" style:parent-style-name="Heading_20_4">
      <style:paragraph-properties fo:margin-left="0in" fo:margin-right="0in" fo:margin-top="0in" fo:margin-bottom="0.0835in" style:contextual-spacing="false" fo:line-height="114%" fo:text-indent="0in" style:auto-text-indent="false"/>
    </style:style>
    <style:style style:name="P23"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style>
    <style:style style:name="P24"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5"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style>
    <style:style style:name="T1" style:family="text">
      <style:text-properties fo:font-weight="bold"/>
    </style:style>
    <style:style style:name="T2" style:family="text">
      <style:text-properties style:font-name="Google Sans Text" fo:font-weight="bold"/>
    </style:style>
    <style:style style:name="T3" style:family="text">
      <style:text-properties style:font-name="Google Sans Text"/>
    </style:style>
    <style:style style:name="T4" style:family="text">
      <style:text-properties style:font-name="Google Sans Text" style:font-name-asian="Google Sans Text" style:font-name-complex="Google Sans Text"/>
    </style:style>
    <style:style style:name="T5" style:family="text">
      <style:text-properties style:font-name="Google Sans"/>
    </style:style>
    <style:style style:name="T6" style:family="text">
      <style:text-properties style:font-name="Google Sans Text" officeooo:rsid="0014ac8a" style:language-asian="ja" style:country-asian="JP"/>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ÀI LIỆU THIẾT KẾ CHI TIẾT (DDD)</text:h>
      <text:p text:style-name="P2"><text:bookmark text:name="p-rc_4b72bdf514b77a73-100"/>Dự án: English Mastery - ALM Engine v2.5 </text:p>
      <text:h text:style-name="P3" text:outline-level="3">1. Tổng quan Kiến trúc &amp; Công nghệ</text:h>
      <text:list text:style-name="L1">
        <text:list-item>
          <text:p text:style-name="P4"><text:bookmark text:name="p-rc_4b72bdf514b77a73-101"/><text:span text:style-name="T1">Loại ứng dụng:</text:span> Single-Page Application (SPA) - Chạy trực tiếp trên trình duyệt. </text:p>
        </text:list-item>
        <text:list-item>
          <text:p text:style-name="P5"><text:bookmark text:name="p-rc_4b72bdf514b77a73-102"/><text:span text:style-name="T2">Core Library:</text:span><text:span text:style-name="T3"> Giao diện được xây dựng bằng React 18 (sử dụng qua CDN với Babel standalone). Quản lý state thông qua các hooks cốt lõi (</text:span><text:span text:style-name="Source_20_Text"><text:span text:style-name="T3">useState</text:span></text:span><text:span text:style-name="T3">, </text:span><text:span text:style-name="Source_20_Text"><text:span text:style-name="T3">useEffect</text:span></text:span><text:span text:style-name="T3">, </text:span><text:span text:style-name="Source_20_Text"><text:span text:style-name="T3">useCallback</text:span></text:span><text:span text:style-name="T3">, </text:span><text:span text:style-name="Source_20_Text"><text:span text:style-name="T3">useMemo</text:span></text:span><text:span text:style-name="T3">, </text:span><text:span text:style-name="Source_20_Text"><text:span text:style-name="T3">useRef</text:span></text:span><text:span text:style-name="T3">). </text:span></text:p>
        </text:list-item>
        <text:list-item>
          <text:p text:style-name="P4"><text:bookmark text:name="p-rc_4b72bdf514b77a73-103"/><text:span text:style-name="T1">Styling:</text:span> Ứng dụng sử dụng Tailwind CSS (CDN), hỗ trợ Dark/Light mode tự động và thiết kế Responsive. </text:p>
        </text:list-item>
        <text:list-item>
          <text:p text:style-name="P4"><text:bookmark text:name="p-rc_4b72bdf514b77a73-104"/><text:span text:style-name="T1">Icon System:</text:span> Tự định nghĩa các SVG Components dạng hàm (dựa trên bộ icon Lucide/Feather) để tối ưu dung lượng và linh hoạt trong việc tùy chỉnh. </text:p>
        </text:list-item>
        <text:list-item>
          <text:p text:style-name="P5"><text:bookmark text:name="p-rc_4b72bdf514b77a73-105"/><text:span text:style-name="T2">Storage Interface:</text:span><text:span text:style-name="T3"> Dữ liệu được quản lý thuần qua localStorage, thông qua wrapper </text:span><text:span text:style-name="Source_20_Text"><text:span text:style-name="T3">safeStorage</text:span></text:span><text:span text:style-name="T3"> (giúp bảo vệ ứng dụng khỏi lỗi quota hoặc khi trình duyệt disabled cookies). </text:span></text:p>
        </text:list-item>
        <text:list-item>
          <text:p text:style-name="P6">Hệ thống Audio/Speech:</text:p>
          <text:list>
            <text:list-item>
              <text:p text:style-name="P5"><text:bookmark text:name="p-rc_4b72bdf514b77a73-106"/><text:span text:style-name="T2">Text-to-Speech (TTS):</text:span><text:span text:style-name="T3"> Ứng dụng tích hợp </text:span><text:span text:style-name="Source_20_Text"><text:span text:style-name="T3">window.speechSynthesis</text:span></text:span><text:span text:style-name="T3"> (Web Speech API). Tích hợp custom hook </text:span><text:span text:style-name="Source_20_Text"><text:span text:style-name="T3">useLoopingAudio</text:span></text:span><text:span text:style-name="T3"> để quản lý việc phát lại âm thanh, cho phép thay đổi tốc độ (rate) và ngắt quãng (delay). </text:span></text:p>
            </text:list-item>
            <text:list-item>
              <text:p text:style-name="P5"><text:bookmark text:name="p-rc_4b72bdf514b77a73-107"/><text:span text:style-name="T2">Speech-to-Text (STT):</text:span><text:span text:style-name="T3"> Sử dụng đa Engine (Web Speech API, Cloud APIs) kết hợp Web Audio API (</text:span><text:span text:style-name="Source_20_Text"><text:span text:style-name="T3">AnalyserNode</text:span></text:span><text:span text:style-name="T3">) để thiết lập Voice Activity Detection (VAD) tự động ngắt mic khi người dùng ngừng nói. Các Cloud API được quản lý qua custom hook </text:span><text:span text:style-name="Source_20_Text"><text:span text:style-name="T3">useCloudRecorder</text:span></text:span><text:span text:style-name="T3">. </text:span></text:p>
            </text:list-item>
          </text:list>
        </text:list-item>
      </text:list>
      <text:h text:style-name="P3" text:outline-level="3">2. Mô hình Dữ liệu (Data Models)</text:h>
      <text:p text:style-name="P2"><text:bookmark text:name="p-rc_4b72bdf514b77a73-108"/>Hệ thống lưu trữ 2 khối dữ liệu chính dưới dạng JSON trong LocalStorage: </text:p>
      <text:h text:style-name="P7" text:outline-level="4">A. Khối Words (Danh sách từ vựng)</text:h>
      <text:p text:style-name="P2"><text:bookmark text:name="p-rc_4b72bdf514b77a73-109"/>Được parse trực tiếp từ file CSV (cách nhau bởi dấu phẩy). </text:p>
      <text:list text:style-name="L2">
        <text:list-item>
          <text:p text:style-name="P8"><text:bookmark text:name="p-rc_4b72bdf514b77a73-110"/><text:span text:style-name="Source_20_Text"><text:span text:style-name="T2">id</text:span></text:span><text:span text:style-name="T3">: Chuỗi định danh (VD: 1-1). </text:span></text:p>
        </text:list-item>
        <text:list-item>
          <text:p text:style-name="P8"><text:bookmark text:name="p-rc_4b72bdf514b77a73-111"/><text:span text:style-name="Source_20_Text"><text:span text:style-name="T2">familyId</text:span></text:span><text:span text:style-name="T3">: ID nhóm từ (dùng để phân loại lộ trình PTE: s1, s2, s3). </text:span></text:p>
        </text:list-item>
        <text:list-item>
          <text:p text:style-name="P8"><text:bookmark text:name="p-rc_4b72bdf514b77a73-112"/><text:span text:style-name="Source_20_Text"><text:span text:style-name="T2">pos</text:span></text:span><text:span text:style-name="T3">: Từ loại (Noun, Verb, Adj...). </text:span></text:p>
        </text:list-item>
        <text:list-item>
          <text:p text:style-name="P8"><text:bookmark text:name="p-rc_4b72bdf514b77a73-113"/><text:span text:style-name="Source_20_Text"><text:span text:style-name="T2">word</text:span></text:span><text:span text:style-name="T3">: Từ vựng tiếng Anh gốc. </text:span></text:p>
        </text:list-item>
        <text:list-item>
          <text:p text:style-name="P8"><text:bookmark text:name="p-rc_4b72bdf514b77a73-114"/><text:span text:style-name="Source_20_Text"><text:span text:style-name="T2">synonyms</text:span></text:span><text:span text:style-name="T3">: Các từ đồng nghĩa. </text:span></text:p>
        </text:list-item>
        <text:list-item>
          <text:p text:style-name="P8"><text:bookmark text:name="p-rc_4b72bdf514b77a73-115"/><text:span text:style-name="Source_20_Text"><text:span text:style-name="T2">meaningVN</text:span></text:span><text:span text:style-name="T3">: Nghĩa tiếng Việt. </text:span></text:p>
        </text:list-item>
      </text:list>
      <text:p text:style-name="P2"><text:bookmark text:name="p-rc_4b72bdf514b77a73-116"/><text:soft-page-break/>B. Khối Progress (Tiến độ học tập - SRS Data) </text:p>
      <text:p text:style-name="P9"><text:bookmark text:name="p-rc_4b72bdf514b77a73-117"/><text:span text:style-name="Source_20_Text"><text:span text:style-name="T2">srsData</text:span></text:span><text:span text:style-name="T3">: Object map theo </text:span><text:span text:style-name="Source_20_Text"><text:span text:style-name="T3">word.id</text:span></text:span><text:span text:style-name="T3">. Bao gồm: </text:span></text:p>
      <text:list text:style-name="L3">
        <text:list-item>
          <text:p text:style-name="P10"><text:bookmark text:name="p-rc_4b72bdf514b77a73-118"/><text:span text:style-name="Source_20_Text"><text:span text:style-name="T2">status</text:span></text:span><text:span text:style-name="T3">: Trạng thái học (0: New, 1: Learning, 2: Mastered). </text:span></text:p>
        </text:list-item>
        <text:list-item>
          <text:p text:style-name="P10"><text:bookmark text:name="p-rc_4b72bdf514b77a73-119"/><text:span text:style-name="Source_20_Text"><text:span text:style-name="T2">srsStep</text:span></text:span><text:span text:style-name="T3">: Bậc ôn tập hiện tại (Dựa trên mảng </text:span><text:span text:style-name="Source_20_Text"><text:span text:style-name="T3">SRS_INTERVALS</text:span></text:span><text:span text:style-name="T3">). Khoảng thời gian (Intervals) được quy định tĩnh: [0, 10 phút, 24 giờ, 3 ngày, 7 ngày]. </text:span></text:p>
        </text:list-item>
        <text:list-item>
          <text:p text:style-name="P10"><text:bookmark text:name="p-rc_4b72bdf514b77a73-120"/><text:span text:style-name="Source_20_Text"><text:span text:style-name="T2">nextReview</text:span></text:span><text:span text:style-name="T3">: Timestamp (ms) mốc thời gian cần ôn lại. </text:span></text:p>
        </text:list-item>
        <text:list-item>
          <text:p text:style-name="P10"><text:bookmark text:name="p-rc_4b72bdf514b77a73-121"/><text:span text:style-name="Source_20_Text"><text:span text:style-name="T2">failCount</text:span></text:span><text:span text:style-name="T3">: Số lần trả lời sai. </text:span></text:p>
        </text:list-item>
        <text:list-item>
          <text:p text:style-name="P10"><text:bookmark text:name="p-rc_4b72bdf514b77a73-122"/><text:span text:style-name="Source_20_Text"><text:span text:style-name="T2">lastInteracted</text:span></text:span><text:span text:style-name="T3">: Lần tương tác cuối cùng với thẻ. </text:span></text:p>
        </text:list-item>
        <text:list-item>
          <text:p text:style-name="P10"><text:bookmark text:name="p-rc_4b72bdf514b77a73-123"/><text:span text:style-name="Source_20_Text"><text:span text:style-name="T2">isHard</text:span></text:span><text:span text:style-name="T3">: Cờ đánh dấu từ khó (true/false). </text:span></text:p>
        </text:list-item>
        <text:list-item>
          <text:p text:style-name="P10"><text:bookmark text:name="p-rc_4b72bdf514b77a73-124"/><text:span text:style-name="Source_20_Text"><text:span text:style-name="T2">sessionPlan</text:span></text:span><text:span text:style-name="T3">: Đối tượng lưu trữ mục tiêu học của ngày hiện tại (bao gồm: </text:span><text:span text:style-name="Source_20_Text"><text:span text:style-name="T3">date</text:span></text:span><text:span text:style-name="T3">, </text:span><text:span text:style-name="Source_20_Text"><text:span text:style-name="T3">ol</text:span></text:span><text:span text:style-name="T3">, </text:span><text:span text:style-name="Source_20_Text"><text:span text:style-name="T3">state</text:span></text:span><text:span text:style-name="T3">, </text:span><text:span text:style-name="Source_20_Text"><text:span text:style-name="T3">newWords</text:span></text:span><text:span text:style-name="T3">, </text:span><text:span text:style-name="Source_20_Text"><text:span text:style-name="T3">reviewWords</text:span></text:span><text:span text:style-name="T3">). </text:span></text:p>
        </text:list-item>
      </text:list>
      <text:h text:style-name="P3" text:outline-level="3">3. Thuật toán Cốt lõi (Core Algorithms)</text:h>
      <text:h text:style-name="P7" text:outline-level="4">3.1. Thuật toán SRS (Spaced Repetition System)</text:h>
      <text:list text:style-name="L4">
        <text:list-item>
          <text:p text:style-name="P11">Xử lý Trúng/Trượt:</text:p>
          <text:list>
            <text:list-item>
              <text:p text:style-name="P12"><text:bookmark text:name="p-rc_4b72bdf514b77a73-125"/><text:span text:style-name="T1">Đúng:</text:span> Thẻ được nhảy +2 bậc SRS. Nếu đạt bậc cuối (Interval 7 ngày), thẻ tự động chuyển sang trạng thái Mastered (Trạng thái 2). </text:p>
            </text:list-item>
            <text:list-item>
              <text:p text:style-name="P13"><text:bookmark text:name="p-rc_4b72bdf514b77a73-126"/><text:span text:style-name="T2">Sai:</text:span><text:span text:style-name="T3"> Logic phụ thuộc vào </text:span><text:span text:style-name="Source_20_Text"><text:span text:style-name="T3">fastReviewMode</text:span></text:span><text:span text:style-name="T3">. Nếu ở chế độ bình thường thì lùi 1 bậc, nếu bật Fast Mode thì giữ nguyên bậc. Thẻ tự động được đánh cờ </text:span><text:span text:style-name="Source_20_Text"><text:span text:style-name="T3">isHard = true</text:span></text:span><text:span text:style-name="T3">. </text:span></text:p>
            </text:list-item>
          </text:list>
        </text:list-item>
      </text:list>
      <text:h text:style-name="P7" text:outline-level="4">3.2. <text:span text:style-name="T3">Thuật toán điều phối Mục tiêu (Study Targets) </text:span></text:h>
      <text:p text:style-name="P2"><text:bookmark text:name="p-rc_4b72bdf514b77a73-127"/>Hệ thống tự động điều chỉnh số lượng từ mới cần nạp (từ 15 - 60 từ) dựa trên Accuracy Rate (AR) của phiên trước. Các thông số đo lường bao gồm: </text:p>
      <text:list text:style-name="L5">
        <text:list-item>
          <text:p text:style-name="P14"><text:bookmark text:name="p-rc_4b72bdf514b77a73-128"/><text:span text:style-name="T1">Overdue Load (OL):</text:span> Khối lượng thẻ đã quá hạn (nextReview &lt;= now). </text:p>
        </text:list-item>
        <text:list-item>
          <text:p text:style-name="P14"><text:bookmark text:name="p-rc_4b72bdf514b77a73-129"/><text:span text:style-name="T1">Stability Index (SI):</text:span> Tỷ lệ phần trăm các thẻ đạt bậc SRS &gt;= 4. </text:p>
        </text:list-item>
        <text:list-item>
          <text:p text:style-name="P14"><text:bookmark text:name="p-rc_4b72bdf514b77a73-130"/><text:span text:style-name="T1">Phân loại trạng thái:</text:span> DANGER (Cảnh báo - OL &gt; 200 hoặc AR &lt; 70), STABLE (Ổn định), EXCELLENT (Xuất sắc - AR &gt;= 85). </text:p>
        </text:list-item>
      </text:list>
      <text:h text:style-name="P7" text:outline-level="4">3.3. Thuật toán Xử lý Giọng nói (Speech Processing)</text:h>
      <text:list text:style-name="L6">
        <text:list-item>
          <text:p text:style-name="P15"><text:bookmark text:name="p-rc_4b72bdf514b77a73-131"/>Sử dụng thuật toán Levenshtein Distance (Edit Distance) để tính toán độ đo khoảng cách và so sánh chuỗi người dùng đọc với chuỗi đích. </text:p>
        </text:list-item>
        <text:list-item>
          <text:p text:style-name="P16"><text:bookmark text:name="p-rc_4b72bdf514b77a73-132"/><text:span text:style-name="T2">Chuẩn hóa văn bản (</text:span><text:span text:style-name="Source_20_Text"><text:span text:style-name="T2">normalizeSpeech</text:span></text:span><text:span text:style-name="T2">):</text:span><text:span text:style-name="T3"> Xóa toàn bộ dấu câu, chuyển số thành chữ (0 -&gt; zero) và đưa về dạng lowercase trước khi so sánh. </text:span></text:p>
        </text:list-item>
        <text:list-item>
          <text:p text:style-name="P16"><text:bookmark text:name="p-rc_4b72bdf514b77a73-133"/><text:span text:style-name="T2">Độ khó Microphone (</text:span><text:span text:style-name="Source_20_Text"><text:span text:style-name="T2">micStrictness</text:span></text:span><text:span text:style-name="T2">):</text:span><text:span text:style-name="T3"> </text:span></text:p>
          <text:list>
            <text:list-item>
              <text:p text:style-name="P15"><text:bookmark text:name="p-rc_4b72bdf514b77a73-134"/><text:soft-page-break/>Easy (Lẹo lưỡi): Độ tương đồng &gt;= 65%. </text:p>
            </text:list-item>
            <text:list-item>
              <text:p text:style-name="P15"><text:bookmark text:name="p-rc_4b72bdf514b77a73-135"/>Normal: Độ tương đồng &gt;= 80%. </text:p>
            </text:list-item>
            <text:list-item>
              <text:p text:style-name="P15"><text:bookmark text:name="p-rc_4b72bdf514b77a73-136"/>Hard (Chuẩn xác): Độ tương đồng &gt;= 90%. </text:p>
            </text:list-item>
          </text:list>
        </text:list-item>
      </text:list>
      <text:h text:style-name="P7" text:outline-level="4">3.4. Thuật toán Xử lý Ngữ âm (IPA &amp; Âm bồi)</text:h>
      <text:list text:style-name="L7">
        <text:list-item>
          <text:p text:style-name="P17"><text:bookmark text:name="p-rc_4b72bdf514b77a73-137"/><text:span text:style-name="T3">Hệ thống gọi API </text:span><text:span text:style-name="Source_20_Text"><text:span text:style-name="T3">dictionaryapi.dev</text:span></text:span><text:span text:style-name="T3"> để lấy IPA chuẩn. </text:span></text:p>
        </text:list-item>
        <text:list-item>
          <text:p text:style-name="P17"><text:bookmark text:name="p-rc_4b72bdf514b77a73-138"/><text:span text:style-name="T3">Nếu API lỗi hoặc timeout (sau 2.5s), hệ thống fallback về hàm </text:span><text:span text:style-name="Source_20_Text"><text:span text:style-name="T3">guessIPA</text:span></text:span><text:span text:style-name="T3">: Dùng Regex để tự động nội suy IPA tương đối dựa trên quy tắc mặt chữ. </text:span></text:p>
        </text:list-item>
        <text:list-item>
          <text:p text:style-name="P17"><text:bookmark text:name="p-rc_4b72bdf514b77a73-139"/><text:span text:style-name="T3">Hàm </text:span><text:span text:style-name="Source_20_Text"><text:span text:style-name="T3">getAmBoi</text:span></text:span><text:span text:style-name="T3">: Mapping chuỗi IPA sang cách đọc "lóng" tiếng Việt (VD: /ʃ/ -&gt; sh, /eɪ/ -&gt; ây) để hỗ trợ người mới bắt đầu. </text:span></text:p>
        </text:list-item>
      </text:list>
      <text:h text:style-name="P3" text:outline-level="3">4. Luồng xử lý Học tập 7 Bước (ALM Flow)</text:h>
      <text:p text:style-name="P9"><text:bookmark text:name="p-rc_4b72bdf514b77a73-140"/><text:span text:style-name="T3">Hệ thống tự động build danh sách học (</text:span><text:span text:style-name="Source_20_Text"><text:span text:style-name="T3">Study Queue</text:span></text:span><text:span text:style-name="T3">) theo nguyên tắc ưu tiên: Từ nợ ôn (Overdue) -&gt; Từ mới (dựa trên sessionPlan). Tùy thuộc vào chế độ (Mặc định vs Advanced) và việc từ có </text:span><text:span text:style-name="Source_20_Text"><text:span text:style-name="T3">synonyms</text:span></text:span><text:span text:style-name="T3"> hay không, một thẻ sẽ đi qua tối đa 7 bước: </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8"><text:span text:style-name="Strong_20_Emphasis"><text:span text:style-name="T3">STT</text:span></text:span></text:p>
            </table:table-cell>
            <table:table-cell table:style-name="Table1.A1" office:value-type="string">
              <text:p text:style-name="P18"><text:span text:style-name="Strong_20_Emphasis"><text:span text:style-name="T3">Tên Bước</text:span></text:span></text:p>
            </table:table-cell>
            <table:table-cell table:style-name="Table1.A1" office:value-type="string">
              <text:p text:style-name="P18"><text:span text:style-name="Strong_20_Emphasis"><text:span text:style-name="T3">Component</text:span></text:span></text:p>
            </table:table-cell>
            <table:table-cell table:style-name="Table1.A1" office:value-type="string">
              <text:p text:style-name="P18"><text:span text:style-name="Strong_20_Emphasis"><text:span text:style-name="T3">Hành động của người dùng</text:span></text:span></text:p>
            </table:table-cell>
            <table:table-cell table:style-name="Table1.A1" office:value-type="string">
              <text:p text:style-name="P18"><text:span text:style-name="Strong_20_Emphasis"><text:span text:style-name="T3">Ghi chú</text:span></text:span></text:p>
            </table:table-cell>
          </table:table-row>
        </table:table-header-rows>
        <table:table-row>
          <table:table-cell table:style-name="Table1.A1" office:value-type="string">
            <text:p text:style-name="P19">B1</text:p>
          </table:table-cell>
          <table:table-cell table:style-name="Table1.A1" office:value-type="string">
            <text:p text:style-name="P20">Nghe &amp; Chép <text:span text:style-name="T4"/></text:p>
          </table:table-cell>
          <table:table-cell table:style-name="Table1.A1" office:value-type="string">
            <text:p text:style-name="P21"><text:span text:style-name="Source_20_Text"><text:span text:style-name="T3">SpellingStep</text:span></text:span><text:span text:style-name="T3"> </text:span></text:p>
          </table:table-cell>
          <table:table-cell table:style-name="Table1.A1" office:value-type="string">
            <text:p text:style-name="P20">Nghe audio đọc từ và gõ lại chính xác (Dictation).<text:span text:style-name="T4"/></text:p>
          </table:table-cell>
          <table:table-cell table:style-name="Table1.A1" office:value-type="string">
            <text:p text:style-name="P20">Tự động phát âm thanh khi render.</text:p>
          </table:table-cell>
        </table:table-row>
        <table:table-row>
          <table:table-cell table:style-name="Table1.A1" office:value-type="string">
            <text:p text:style-name="P19">B2</text:p>
          </table:table-cell>
          <table:table-cell table:style-name="Table1.A1" office:value-type="string">
            <text:p text:style-name="P20">Luyện âm <text:span text:style-name="T4"/></text:p>
          </table:table-cell>
          <table:table-cell table:style-name="Table1.A1" office:value-type="string">
            <text:p text:style-name="P21"><text:span text:style-name="Source_20_Text"><text:span text:style-name="T3">PronunciationStep</text:span></text:span><text:span text:style-name="T3"> </text:span></text:p>
          </table:table-cell>
          <table:table-cell table:style-name="Table1.A1" office:value-type="string">
            <text:p text:style-name="P20">Bấm Mic và đọc lại từ tiếng Anh cho đến khi máy nhận diện đúng.<text:span text:style-name="T4"/></text:p>
          </table:table-cell>
          <table:table-cell table:style-name="Table1.A1" office:value-type="string">
            <text:p text:style-name="P20">Ẩn khi bật Silent Mode.<text:span text:style-name="T4"/></text:p>
          </table:table-cell>
        </table:table-row>
        <table:table-row>
          <table:table-cell table:style-name="Table1.A1" office:value-type="string">
            <text:p text:style-name="P19">B3</text:p>
          </table:table-cell>
          <table:table-cell table:style-name="Table1.A1" office:value-type="string">
            <text:p text:style-name="P20">Chọn nghĩa VN <text:span text:style-name="T4"/></text:p>
          </table:table-cell>
          <table:table-cell table:style-name="Table1.A1" office:value-type="string">
            <text:p text:style-name="P21"><text:span text:style-name="Source_20_Text"><text:span text:style-name="T3">MeaningVNStep</text:span></text:span><text:span text:style-name="T3"> </text:span></text:p>
          </table:table-cell>
          <table:table-cell table:style-name="Table1.A1" office:value-type="string">
            <text:p text:style-name="P20">Đọc nghĩa tiếng Việt vào Mic (hoặc chọn trắc nghiệm nếu sai/im lặng).<text:span text:style-name="T4"/></text:p>
          </table:table-cell>
          <table:table-cell table:style-name="Table1.A1" office:value-type="string">
            <text:p text:style-name="P20">Hỗ trợ fallback sang trắc nghiệm.</text:p>
          </table:table-cell>
        </table:table-row>
        <table:table-row>
          <table:table-cell table:style-name="Table1.A1" office:value-type="string">
            <text:p text:style-name="P19">B4</text:p>
          </table:table-cell>
          <table:table-cell table:style-name="Table1.A1" office:value-type="string">
            <text:p text:style-name="P20">Phản xạ gốc <text:span text:style-name="T4"/></text:p>
          </table:table-cell>
          <table:table-cell table:style-name="Table1.A1" office:value-type="string">
            <text:p text:style-name="P21"><text:span text:style-name="Source_20_Text"><text:span text:style-name="T3">RootReflexStep</text:span></text:span><text:span text:style-name="T3"> </text:span></text:p>
          </table:table-cell>
          <table:table-cell table:style-name="Table1.A1" office:value-type="string">
            <text:p text:style-name="P20">Nhìn nghĩa Tiếng Việt, phản xạ đọc từ tiếng Anh gốc vào Mic.<text:span text:style-name="T4"/></text:p>
          </table:table-cell>
          <table:table-cell table:style-name="Table1.A1" office:value-type="string">
            <text:p text:style-name="P20">Ẩn khi bật Silent Mode.<text:span text:style-name="T4"/></text:p>
          </table:table-cell>
        </table:table-row>
        <table:table-row>
          <table:table-cell table:style-name="Table1.A1" office:value-type="string">
            <text:p text:style-name="P19">B5</text:p>
          </table:table-cell>
          <table:table-cell table:style-name="Table1.A1" office:value-type="string">
            <text:p text:style-name="P20">Chọn Synonym <text:span text:style-name="T4"/></text:p>
          </table:table-cell>
          <table:table-cell table:style-name="Table1.A1" office:value-type="string">
            <text:p text:style-name="P21"><text:span text:style-name="Source_20_Text"><text:span text:style-name="T3">MeaningSynonymStep</text:span></text:span><text:span text:style-name="T3"> </text:span></text:p>
          </table:table-cell>
          <table:table-cell table:style-name="Table1.A1" office:value-type="string">
            <text:p text:style-name="P20">Trắc nghiệm (bấm số 1-4 trên bàn phím) chọn từ đồng nghĩa dựa trên từ gốc.<text:span text:style-name="T4"/></text:p>
          </table:table-cell>
          <table:table-cell table:style-name="Table1.A1" office:value-type="string">
            <text:p text:style-name="P20">Chỉ xuất hiện khi từ có synonym.</text:p>
          </table:table-cell>
        </table:table-row>
        <table:table-row>
          <table:table-cell table:style-name="Table1.A1" office:value-type="string">
            <text:p text:style-name="P19">B6</text:p>
          </table:table-cell>
          <table:table-cell table:style-name="Table1.A1" office:value-type="string">
            <text:p text:style-name="P20">Check Synonym <text:span text:style-name="T4"/></text:p>
          </table:table-cell>
          <table:table-cell table:style-name="Table1.A1" office:value-type="string">
            <text:p text:style-name="P21"><text:span text:style-name="Source_20_Text"><text:span text:style-name="T3">SynonymMeaningStep</text:span></text:span><text:span text:style-name="T3"> </text:span></text:p>
          </table:table-cell>
          <table:table-cell table:style-name="Table1.A1" office:value-type="string">
            <text:p text:style-name="P20">Trắc nghiệm (bấm số 1-4) chọn nghĩa tiếng Việt của từ đồng nghĩa.<text:span text:style-name="T4"/></text:p>
          </table:table-cell>
          <table:table-cell table:style-name="Table1.A1" office:value-type="string">
            <text:p text:style-name="P20">Kiểm tra chéo nghĩa.</text:p>
          </table:table-cell>
        </table:table-row>
        <table:table-row>
          <table:table-cell table:style-name="Table1.A1" office:value-type="string">
            <text:p text:style-name="P19">B7</text:p>
          </table:table-cell>
          <table:table-cell table:style-name="Table1.A1" office:value-type="string">
            <text:p text:style-name="P20">Phản xạ kép <text:span text:style-name="T4"/></text:p>
          </table:table-cell>
          <table:table-cell table:style-name="Table1.A1" office:value-type="string">
            <text:p text:style-name="P21"><text:span text:style-name="Source_20_Text"><text:span text:style-name="T3">DoubleReflexStep</text:span></text:span><text:span text:style-name="T3"> </text:span></text:p>
          </table:table-cell>
          <table:table-cell table:style-name="Table1.A1" office:value-type="string">
            <text:p text:style-name="P20">Nhìn nghĩa tiếng Việt, đọc cả từ gốc VÀ từ đồng nghĩa vào Mic.<text:span text:style-name="T4"/></text:p>
          </table:table-cell>
          <table:table-cell table:style-name="Table1.A1" office:value-type="string">
            <text:p text:style-name="P20">Thay thế bằng B6 nếu bật Silent Mode.</text:p>
          </table:table-cell>
        </table:table-row>
      </table:table>
      <text:h text:style-name="P3" text:outline-level="3"><text:soft-page-break/>5. Sub-systems &amp; Tích hợp API</text:h>
      <text:h text:style-name="P22" text:outline-level="4"><text:span text:style-name="T5">5.1. Module Audio &amp; STT (</text:span><text:span text:style-name="Source_20_Text"><text:span text:style-name="T3">useCloudRecorder</text:span></text:span><text:span text:style-name="T5">)</text:span></text:h>
      <text:p text:style-name="P2"><text:bookmark text:name="p-rc_4b72bdf514b77a73-141"/>Module xử lý linh hoạt cho 2 luồng ngôn ngữ độc lập: </text:p>
      <text:list text:style-name="L8">
        <text:list-item>
          <text:p text:style-name="P23"><text:bookmark text:name="p-rc_4b72bdf514b77a73-142"/><text:span text:style-name="T2">Tiếng Anh (</text:span><text:span text:style-name="Source_20_Text"><text:span text:style-name="T2">sttEngineEn</text:span></text:span><text:span text:style-name="T2">):</text:span><text:span text:style-name="T3"> </text:span></text:p>
          <text:list>
            <text:list-item>
              <text:p text:style-name="P24"><text:bookmark text:name="p-rc_4b72bdf514b77a73-143"/>Trình duyệt (Web Speech API) - Mặc định. </text:p>
            </text:list-item>
            <text:list-item>
              <text:p text:style-name="P24"><text:bookmark text:name="p-rc_4b72bdf514b77a73-144"/>OpenAI (Whisper-1). </text:p>
            </text:list-item>
            <text:list-item>
              <text:p text:style-name="P24"><text:bookmark text:name="p-rc_4b72bdf514b77a73-145"/>Groq (Whisper-large-v3). </text:p>
            </text:list-item>
            <text:list-item>
              <text:p text:style-name="P24"><text:bookmark text:name="p-rc_4b72bdf514b77a73-146"/>Google Cloud STT. </text:p>
            </text:list-item>
            <text:list-item>
              <text:p text:style-name="P24"><text:bookmark text:name="p-rc_4b72bdf514b77a73-147"/>Local Whisper (chạy local server). </text:p>
            </text:list-item>
          </text:list>
        </text:list-item>
        <text:list-item>
          <text:p text:style-name="P23"><text:bookmark text:name="p-rc_4b72bdf514b77a73-148"/><text:span text:style-name="T2">Tiếng Việt (</text:span><text:span text:style-name="Source_20_Text"><text:span text:style-name="T2">sttEngineVn</text:span></text:span><text:span text:style-name="T2">):</text:span><text:span text:style-name="T3"> </text:span></text:p>
          <text:list>
            <text:list-item>
              <text:p text:style-name="P24"><text:bookmark text:name="p-rc_4b72bdf514b77a73-149"/>Groq (Mặc định). </text:p>
            </text:list-item>
            <text:list-item>
              <text:p text:style-name="P24"><text:bookmark text:name="p-rc_4b72bdf514b77a73-150"/>FPT.AI (Khuyên dùng cho VN). </text:p>
            </text:list-item>
            <text:list-item>
              <text:p text:style-name="P24"><text:bookmark text:name="p-rc_4b72bdf514b77a73-151"/>Viettel AI. </text:p>
            </text:list-item>
          </text:list>
        </text:list-item>
        <text:list-item>
          <text:p text:style-name="P23"><text:bookmark text:name="p-rc_4b72bdf514b77a73-152"/><text:span text:style-name="T2">Prompt Engineering:</text:span><text:span text:style-name="T3"> Ứng dụng truyền trước </text:span><text:span text:style-name="Source_20_Text"><text:span text:style-name="T3">targetText</text:span></text:span><text:span text:style-name="T3"> vào tham số prompt của OpenAI/Groq/Local Whisper để ép model phiên âm theo ngữ cảnh của từ vựng mục tiêu, giúp giảm thiểu đáng kể lỗi nhận diện đồng âm. Tự động loại bỏ các câu rác do Whisper sinh ra (như "Subtitles by", "Subscribe", v.v.). </text:span></text:p>
        </text:list-item>
      </text:list>
      <text:h text:style-name="P7" text:outline-level="4">5.2. Các tính năng cốt lõi khác</text:h>
      <text:list text:style-name="L9">
        <text:list-item>
          <text:p text:style-name="P25"><text:bookmark text:name="p-rc_4b72bdf514b77a73-153"/><text:span text:style-name="T2">Dashboard &amp; PTE Roadmap:</text:span><text:span text:style-name="T3"> Tracker tính toán tiến độ dựa trên thuộc tính </text:span><text:span text:style-name="Source_20_Text"><text:span text:style-name="T3">familyId</text:span></text:span><text:span text:style-name="T3">, chia thành 3 mốc PTE: Vocational (36-50), Proficient (50-65), Superior (65-79+). Giao diện Dashboard render thanh tiến trình (progress bar) và trạng thái tương ứng của từng nhóm từ. </text:span></text:p>
        </text:list-item>
        <text:list-item>
          <text:p text:style-name="P25"><text:bookmark text:name="p-rc_4b72bdf514b77a73-154"/><text:span text:style-name="T2">Pomodoro Break:</text:span><text:span text:style-name="T3"> Hiển thị màn hình nghỉ ngơi đếm ngược 5 phút sau </text:span><text:span text:style-name="T6">25 phút hoặc </text:span><text:span text:style-name="T3">mỗi 50 thẻ (Sử dụng biến </text:span><text:span text:style-name="Source_20_Text"><text:span text:style-name="T3">POMODORO_LIMIT_CARDS = 50</text:span></text:span><text:span text:style-name="T3">). </text:span></text:p>
        </text:list-item>
        <text:list-item>
          <text:p text:style-name="P25"><text:bookmark text:name="p-rc_4b72bdf514b77a73-155"/><text:span text:style-name="T2">Distraction Guard:</text:span><text:span text:style-name="T3"> Tự động theo dõi các sự kiện (</text:span><text:span text:style-name="Source_20_Text"><text:span text:style-name="T3">mousemove</text:span></text:span><text:span text:style-name="T3">, </text:span><text:span text:style-name="Source_20_Text"><text:span text:style-name="T3">keydown</text:span></text:span><text:span text:style-name="T3">, </text:span><text:span text:style-name="Source_20_Text"><text:span text:style-name="T3">touchstart</text:span></text:span><text:span text:style-name="T3">). Kích hoạt màn hình "Cảnh báo mất tập trung" nếu không có thao tác nào trong 60 giây khi đang trong phiên học. </text:span></text:p>
        </text:list-item>
        <text:list-item>
          <text:p text:style-name="P25"><text:bookmark text:name="p-rc_4b72bdf514b77a73-156"/><text:span text:style-name="T2">Quản lý Dữ liệu (Backup/Restore):</text:span><text:span text:style-name="T3"> Cho phép xuất/nhập toàn bộ tiến độ (Words + SRS Data + Session Plan) ra file JSON định dạng tĩnh, hoặc xuất riêng file JSON chỉ chứa các "Từ Khó" (</text:span><text:span text:style-name="Source_20_Text"><text:span text:style-name="T3">isHard = true</text:span></text:span><text:span text:style-name="T3">) để ôn tập chuyên sâu. </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8T08:56:34.125297800</meta:creation-date>
    <dc:date>2026-05-18T11:59:09.763109800</dc:date>
    <meta:editing-duration>PT44S</meta:editing-duration>
    <meta:editing-cycles>3</meta:editing-cycles>
    <meta:generator>LibreOffice/25.8.6.2$Windows_X86_64 LibreOffice_project/b4b39682cd9868fa725bc664aff94278d315bd04</meta:generator>
    <meta:document-statistic meta:table-count="1" meta:image-count="0" meta:object-count="0" meta:page-count="4" meta:paragraph-count="112" meta:word-count="1287" meta:character-count="6670" meta:non-whitespace-character-count="5474"/>
  </office:meta>
</office:document-meta>
</file>