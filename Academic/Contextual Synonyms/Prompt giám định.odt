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font-weight="bold"/>
    </style:style>
    <style:style style:name="P2" style:family="paragraph" style:parent-style-name="Text_20_body">
      <style:text-properties fo:font-weight="bold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T1" style:family="text">
      <style:text-properties fo:font-weight="bold"/>
    </style:style>
    <style:style style:name="T2" style:family="text">
      <style:text-properties fo:font-weight="bold" officeooo:rsid="001d58a1"/>
    </style:style>
    <style:style style:name="T3" style:family="text">
      <style:text-properties fo:font-weight="bold" officeooo:rsid="001cd69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PROMPT TỰ ĐỘNG KIỂM TRA VÀ FIX DỮ LIỆU JSON</text:h>
      <text:p text:style-name="Text_20_body"><text:span text:style-name="T1">Role:</text:span> Bạn là một hệ thống kiểm soát chất lượng (QA) dữ liệu đào tạo AI.</text:p>
      <text:p text:style-name="Text_20_body"><text:span text:style-name="T1">Nhiệm vụ:</text:span> Kiểm tra mảng JSON dưới đây, phát hiện lỗi và TRẢ VỀ DUY NHẤT một mảng JSON đã được sửa đổi hoàn chỉnh.</text:p>
      <text:p text:style-name="P2">Quy tắc kiểm tra &amp; Sửa lỗi (BẮT BUỘC):</text:p>
      <text:list text:style-name="L1">
        <text:list-item>
          <text:p text:style-name="P3"><text:span text:style-name="T1">Lỗi loại từ (POS):</text:span> Nếu <text:span text:style-name="Source_20_Text">correct</text:span> là tính từ, 3 <text:span text:style-name="Source_20_Text">distractors</text:span> cũng phải là tính từ. Nếu không khớp, hãy thay thế distractors bằng từ cùng POS.</text:p>
        </text:list-item>
        <text:list-item>
          <text:p text:style-name="P3"><text:span text:style-name="T1">Lỗi độ dài:</text:span> Nếu <text:span text:style-name="Source_20_Text">correct</text:span> là một cụm từ dài (phrase), các <text:span text:style-name="Source_20_Text">distractors</text:span> cũng phải là cụm từ có độ dài tương đương (không được để 1 từ đơn nhiễu cho 1 cụm dài).</text:p>
        </text:list-item>
        <text:list-item>
          <text:p text:style-name="P3"><text:span text:style-name="T1">Lỗi "Lộ" đáp án:</text:span> Xóa bỏ các từ nhiễu quá vô lý (như "abc", "xyz" hoặc từ trái nghĩa quá thô thiển). Thay bằng bẫy Hình thái, Ngữ cảnh hoặc Sắc thái.</text:p>
        </text:list-item>
        <text:list-item>
          <text:p text:style-name="P3"><text:span text:style-name="T1">Lỗi trùng lặp:</text:span> Đảm bảo các <text:span text:style-name="Source_20_Text">id</text:span> là duy nhất và không bị lặp câu ví dụ.</text:p>
        </text:list-item>
        <text:list-item>
          <text:p text:style-name="P3"><text:span text:style-name="T1">Định dạng:</text:span> Giữ nguyên cấu trúc JSON ban đầu (<text:span text:style-name="Source_20_Text">id</text:span>, <text:span text:style-name="Source_20_Text">familyId</text:span>, <text:span text:style-name="Source_20_Text">word</text:span>, <text:span text:style-name="Source_20_Text">sentence</text:span>, <text:span text:style-name="Source_20_Text">correct</text:span>, <text:span text:style-name="Source_20_Text">distractors</text:span>, <text:span text:style-name="Source_20_Text">translation</text:span>, <text:span text:style-name="Source_20_Text">analysis</text:span>).</text:p>
        </text:list-item>
      </text:list>
      <text:p text:style-name="P2">Yêu cầu đầu ra:</text:p>
      <text:list text:style-name="L2">
        <text:list-item>
          <text:p text:style-name="P4">KHÔNG giải thích dông dài.</text:p>
        </text:list-item>
        <text:list-item>
          <text:p text:style-name="P4">KHÔNG chào hỏi.</text:p>
        </text:list-item>
        <text:list-item>
          <text:p text:style-name="P4">CHỈ xuất ra khối mã JSON (Code block) đã được fix lỗi.</text:p>
        </text:list-item>
      </text:list>
      <text:p text:style-name="Text_20_body"><text:span text:style-name="T1">Dữ liệu cần xử lý</text:span><text:span text:style-name="T2"> sẽ</text:span><text:span text:style-name="T1"> </text:span><text:span text:style-name="T3">được đính kèm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3T19:25:42.743819400</meta:creation-date>
    <dc:date>2026-04-03T19:28:50.110156500</dc:date>
    <meta:editing-duration>PT26S</meta:editing-duration>
    <meta:editing-cycles>4</meta:editing-cycles>
    <meta:generator>LibreOffice/25.8.5.2$Windows_X86_64 LibreOffice_project/9c8b85f387cc00a89945a79c9e6239f32e450ac2</meta:generator>
    <meta:document-statistic meta:table-count="0" meta:image-count="0" meta:object-count="0" meta:page-count="1" meta:paragraph-count="14" meta:word-count="228" meta:character-count="1050" meta:non-whitespace-character-count="844"/>
  </office:meta>
</office:document-meta>
</file>