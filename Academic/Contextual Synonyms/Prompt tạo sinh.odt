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3pt" fo:font-weight="bold" style:font-size-asian="13pt" style:font-weight-asian="bold" style:font-size-complex="13pt" style:font-weight-complex="bold"/>
    </style:style>
    <style:style style:name="P2" style:family="paragraph" style:parent-style-name="Text_20_body">
      <style:text-properties fo:font-size="13pt" fo:font-weight="normal" style:font-size-asian="13pt" style:font-weight-asian="normal" style:font-size-complex="13pt" style:font-weight-complex="normal"/>
    </style:style>
    <style:style style:name="P3" style:family="paragraph" style:parent-style-name="Text_20_body" style:list-style-name="L1">
      <style:text-properties fo:font-weight="bold"/>
    </style:style>
    <style:style style:name="P4" style:family="paragraph" style:parent-style-name="Text_20_body" style:list-style-name="L1">
      <style:text-properties fo:font-size="13pt" fo:font-weight="normal" style:font-size-asian="13pt" style:font-weight-asian="normal" style:font-size-complex="13pt" style:font-weight-complex="normal"/>
    </style:style>
    <style:style style:name="P5" style:family="paragraph" style:parent-style-name="Text_20_body">
      <style:paragraph-properties fo:margin-left="0in" fo:margin-right="0in" fo:text-indent="0in" style:auto-text-indent="false"/>
      <style:text-properties fo:font-size="13pt" fo:font-weight="normal" style:font-size-asian="13pt" style:font-weight-asian="normal" style:font-size-complex="13pt" style:font-weight-complex="normal"/>
    </style:style>
    <style:style style:name="P6" style:family="paragraph" style:parent-style-name="Preformatted_20_Text">
      <style:paragraph-properties fo:margin-top="0in" fo:margin-bottom="0.0972in" style:contextual-spacing="false" fo:line-height="115%"/>
      <style:text-properties fo:font-weight="bold"/>
    </style:style>
    <style:style style:name="P7" style:family="paragraph" style:parent-style-name="Text_20_body" style:list-style-name="L2">
      <style:text-properties fo:font-size="13pt" fo:font-weight="normal" style:font-size-asian="13pt" style:font-weight-asian="normal" style:font-size-complex="13pt" style:font-weight-complex="normal"/>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3pt" fo:font-weight="normal" officeooo:rsid="00176928" style:font-size-asian="13pt" style:font-weight-asian="normal" style:font-size-complex="13pt" style:font-weight-complex="normal"/>
    </style:style>
    <style:style style:name="T3" style:family="text">
      <style:text-properties fo:font-variant="normal" fo:text-transform="none" fo:color="#0f1115" loext:opacity="100%" fo:font-family="quote-cjk-patch, Inter, system-ui, apple-system, BlinkMacSystemFont, 'Segoe UI', Roboto, Oxygen, Ubuntu, Cantarell, 'Open Sans', 'Helvetica Neue', sans-serif" fo:font-size="12pt" fo:letter-spacing="normal" fo:font-style="normal" fo:font-weight="normal"/>
    </style:style>
    <style:style style:name="T4" style:family="text">
      <style:text-properties fo:font-size="13pt" fo:font-weight="normal" officeooo:rsid="00198208" style:font-size-asian="13pt" style:font-weight-asian="normal" style:font-size-complex="13pt" style:font-weight-complex="normal"/>
    </style:style>
    <style:style style:name="T5" style:family="text">
      <style:text-properties fo:font-style="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ROMPT TẠO DỮ LIỆU HỌC PTE (CONTEXTUAL SYNONYMS)</text:h>
      <text:p text:style-name="P2"><text:bookmark-start text:name="__DdeLink__106_4265254179"/>Role: Bạn là một chuyên gia khảo thí ngôn ngữ cấp cao cho kỳ thi PTE Academic. Nhiệm vụ của bạn là chuyển đổi danh sách từ vựng thô thành bộ câu hỏi trắc nghiệm ngữ cảnh (Contextual Multiple Choice) chất lượng cao.</text:p>
      <text:p text:style-name="P2">Task: Dựa trên danh sách từ vựng CSV bên dưới, hãy tạo dữ liệu học tập theo định dạng JSON.</text:p>
      <text:p text:style-name="Text_20_body"><text:span text:style-name="T1">Input Data: </text:span><text:span text:style-name="T2">File từ vựng </text:span><text:span text:style-name="T3">Academic</text:span></text:p>
      <text:p text:style-name="P2">Yêu cầu kỹ thuật cho dữ liệu đầu ra:</text:p>
      <text:list text:style-name="L1">
        <text:list-item>
          <text:p text:style-name="P3"><text:span text:style-name="T1">Sentence: Mỗi </text:span><text:span text:style-name="T4">từ/cụm từ là một dòng trong file dữ liệu, hãy tạo </text:span><text:span text:style-name="T1">câu ví dụ phải mang tính học thuật (Academic), ưu tiên các chủ đề: Giáo dục, Khoa học, Xã hội Úc, Kinh tế, hoặc Di trú. Để trống từ cần điền bằng </text:span><text:span text:style-name="Source_20_Text"><text:span text:style-name="T1">____</text:span></text:span><text:span text:style-name="T1">.</text:span></text:p>
        </text:list-item>
        <text:list-item>
          <text:p text:style-name="P4">Correct Answer: Phải là chính từ đó hoặc cụm từ đó (Collocation).</text:p>
        </text:list-item>
        <text:list-item>
          <text:p text:style-name="P4">Distractors (3 phương án nhiễu):</text:p>
          <text:list>
            <text:list-item>
              <text:p text:style-name="P4">Nhiễu 1 (Visual/Morphology): Cùng loại từ, viết gần giống (ví dụ: <text:span text:style-name="T5">principal</text:span> vs <text:span text:style-name="T5">principle</text:span>).</text:p>
            </text:list-item>
            <text:list-item>
              <text:p text:style-name="P4">Nhiễu 2 (Collocation): Cùng chủ đề nhưng không kết hợp được với các từ đứng trước/sau trong câu (Ví dụ: dùng <text:span text:style-name="T5">heavy rain</text:span> chứ không dùng <text:span text:style-name="T5">strong rain</text:span>).</text:p>
            </text:list-item>
            <text:list-item>
              <text:p text:style-name="P4">Nhiễu 3 (Connotation/Nuance): Nghĩa tương tự nhưng sai sắc thái trang trọng hoặc sai mức độ (ví dụ: <text:span text:style-name="T5">cheap</text:span> vs <text:span text:style-name="T5">affordable</text:span>).</text:p>
            </text:list-item>
          </text:list>
        </text:list-item>
        <text:list-item>
          <text:p text:style-name="P4">Translation: Dịch câu ví dụ sang tiếng Việt súc tích.</text:p>
        </text:list-item>
        <text:list-item>
          <text:p text:style-name="P4">Analysis: Giải thích cực ngắn tại sao đáp án đó đúng và bẫy ở các từ nhiễu là gì.</text:p>
        </text:list-item>
      </text:list>
      <text:p text:style-name="P2">Định dạng JSON mẫu (Bắt buộc tuân thủ):</text:p>
      <text:p text:style-name="P5">JSON</text:p>
      <text:p text:style-name="P6"><text:span text:style-name="Source_20_Text"><text:span text:style-name="T1">[</text:span></text:span></text:p>
      <text:p text:style-name="P6"><text:span text:style-name="Source_20_Text"><text:span text:style-name="T1"><text:s text:c="2"/>{</text:span></text:span></text:p>
      <text:p text:style-name="P6"><text:span text:style-name="Source_20_Text"><text:span text:style-name="T1"><text:s text:c="4"/>"id": "1-1",</text:span></text:span></text:p>
      <text:p text:style-name="P6"><text:span text:style-name="Source_20_Text"><text:span text:style-name="T1"><text:s text:c="4"/>"familyId": "1",</text:span></text:span></text:p>
      <text:p text:style-name="P6"><text:span text:style-name="Source_20_Text"><text:span text:style-name="T1"><text:s text:c="4"/>"word": "compulsory",</text:span></text:span></text:p>
      <text:p text:style-name="P6"><text:span text:style-name="Source_20_Text"><text:span text:style-name="T1"><text:s text:c="4"/>"sentence": "In Australia, primary and secondary education is ____ for all children aged 6 to 16.",</text:span></text:span></text:p>
      <text:p text:style-name="P6"><text:span text:style-name="Source_20_Text"><text:span text:style-name="T1"><text:s text:c="4"/>"correct": "compulsory",</text:span></text:span></text:p>
      <text:p text:style-name="P6"><text:soft-page-break/><text:span text:style-name="Source_20_Text"><text:span text:style-name="T1"><text:s text:c="4"/>"distractors": ["comprehensive", "compulsive", "voluntary"],</text:span></text:span></text:p>
      <text:p text:style-name="P6"><text:span text:style-name="Source_20_Text"><text:span text:style-name="T1"><text:s text:c="4"/>"translation": "Tại Úc, giáo dục tiểu học và trung học là bắt buộc đối với tất cả trẻ em từ 6 đến 16 tuổi.",</text:span></text:span></text:p>
      <text:p text:style-name="P6"><text:span text:style-name="Source_20_Text"><text:span text:style-name="T1"><text:s text:c="4"/>"analysis": "Compulsory (bắt buộc theo luật) đi với education. Comprehensive là toàn diện, Compulsive là thuộc về bản năng/khó kiểm soát, Voluntary là tự nguyện."</text:span></text:span></text:p>
      <text:p text:style-name="P6"><text:span text:style-name="Source_20_Text"><text:span text:style-name="T1"><text:s text:c="2"/>}</text:span></text:span></text:p>
      <text:p text:style-name="P6"><text:span text:style-name="Source_20_Text"><text:span text:style-name="T1">]</text:span></text:span></text:p>
      <text:p text:style-name="P2">Lưu ý quan trọng: - Tuyệt đối không để các phương án nhiễu khác loại từ (ví dụ: nếu đáp án là danh từ, 3 từ nhiễu cũng phải là danh từ).</text:p>
      <text:list text:style-name="L2">
        <text:list-item>
          <text:p text:style-name="P7">Nếu là một cụm từ (phrase), hãy đặt câu sao cho cụm đó là đáp án đúng tự nhiên nhất.</text:p>
        </text:list-item>
        <text:list-item>
          <text:p text:style-name="P7">Trả về kết quả dưới dạng một mảng JSON duy nhất.</text:p>
        </text:list-item>
      </text:list>
      <text:p text:style-name="P2"><text:bookmark-end text:name="__DdeLink__106_426525417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3T18:44:12.172712000</meta:creation-date>
    <dc:date>2026-04-05T07:55:06.595523200</dc:date>
    <meta:editing-duration>PT22M54S</meta:editing-duration>
    <meta:editing-cycles>12</meta:editing-cycles>
    <meta:generator>LibreOffice/25.8.5.2$Windows_X86_64 LibreOffice_project/9c8b85f387cc00a89945a79c9e6239f32e450ac2</meta:generator>
    <meta:document-statistic meta:table-count="0" meta:image-count="0" meta:object-count="0" meta:page-count="2" meta:paragraph-count="30" meta:word-count="404" meta:character-count="2095" meta:non-whitespace-character-count="1695"/>
  </office:meta>
</office:document-meta>
</file>