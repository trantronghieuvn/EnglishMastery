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3" style:family="paragraph" style:parent-style-name="Text_20_body">
      <style:paragraph-properties fo:margin-left="0in" fo:margin-right="0in" fo:margin-top="0in" fo:margin-bottom="0.0972in" style:contextual-spacing="false" fo:line-height="114%" fo:text-indent="0in" style:auto-text-indent="false"/>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6"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7"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9"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10"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1"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IẾT KẾ HỆ THỐNG HỌC TẬP THÍCH ỨNG (ALM SYSTEM)</text:h>
      <text:p text:style-name="P2"><text:span text:style-name="T1">Vai trò:</text:span> Bạn là Chuyên gia Lập trình Full-stack chuyên về EdTech và Khoa học Trí nhớ (Memory Science).</text:p>
      <text:p text:style-name="P3"><text:span text:style-name="T2">Nhiệm vụ:</text:span><text:span text:style-name="T3"> Tái cấu trúc file </text:span><text:span text:style-name="Source_20_Text"><text:span text:style-name="T3">HocTiengAnh.html</text:span></text:span><text:span text:style-name="T3"> thành một ứng dụng Single Page Application (SPA) mạnh mẽ, chạy Local-first, xử lý dữ liệu từ </text:span><text:span text:style-name="Source_20_Text"><text:span text:style-name="T3">Academic.csv</text:span></text:span><text:span text:style-name="T3"> và </text:span><text:span text:style-name="Source_20_Text"><text:span text:style-name="T3">EM_Backup.json</text:span></text:span><text:span text:style-name="T3">.</text:span></text:p>
      <text:p text:style-name="Horizontal_20_Line"/>
      <text:h text:style-name="P4" text:outline-level="3">1. KIẾN TRÚC DỮ LIỆU &amp; LƯU TRỮ (LOCAL-FIRST)</text:h>
      <text:list text:style-name="L1">
        <text:list-item>
          <text:p text:style-name="P5"><text:span text:style-name="T1">Data Source:</text:span> Đọc danh sách từ vựng gốc từ file CSV/JSON người dùng tải lên.</text:p>
        </text:list-item>
        <text:list-item>
          <text:p text:style-name="P6"><text:span text:style-name="T2">Database:</text:span><text:span text:style-name="T3"> Sử dụng </text:span><text:span text:style-name="Source_20_Text"><text:span text:style-name="T3">localStorage</text:span></text:span><text:span text:style-name="T3"> để quản lý tiến độ. Cấu trúc mỗi bản ghi:</text:span></text:p>
          <text:p text:style-name="P6"><text:span text:style-name="Source_20_Text"><text:span text:style-name="T3">{ id: string, status: 0|1|2, srs_step: 1..5, next_review: Date, fail_count: number, last_interacted: Timestamp }</text:span></text:span><text:span text:style-name="T3">.</text:span></text:p>
        </text:list-item>
        <text:list-item>
          <text:p text:style-name="P6"><text:span text:style-name="T2">Sync:</text:span><text:span text:style-name="T3"> Tự động đồng nhất dữ liệu tĩnh (file) và dữ liệu động (localStorage) dựa trên </text:span><text:span text:style-name="Source_20_Text"><text:span text:style-name="T3">id</text:span></text:span><text:span text:style-name="T3"> duy nhất.</text:span></text:p>
        </text:list-item>
      </text:list>
      <text:h text:style-name="P4" text:outline-level="3">2. THUẬT TOÁN ĐIỀU PHỐI "DÂU TRĂM HỌ"</text:h>
      <text:p text:style-name="P3"><text:span text:style-name="T3">Xây dựng hàm </text:span><text:span text:style-name="Source_20_Text"><text:span text:style-name="T3">Scheduler</text:span></text:span><text:span text:style-name="T3"> thông minh để tạo hàng đợi học tập (</text:span><text:span text:style-name="Source_20_Text"><text:span text:style-name="T3">CurrentQueue</text:span></text:span><text:span text:style-name="T3">):</text:span></text:p>
      <text:list text:style-name="L2">
        <text:list-item>
          <text:p text:style-name="P7"><text:span text:style-name="T1">Cơ chế Hồi phục (The Bridge):</text:span> Nếu phát hiện phiên trước bị bỏ dở, luôn đưa 3-5 từ tương tác cuối cùng vào đầu hàng đợi để mồi não.</text:p>
        </text:list-item>
        <text:list-item>
          <text:p text:style-name="P8">Chế độ Học Tranh Thủ (Free Flow):</text:p>
          <text:list>
            <text:list-item>
              <text:p text:style-name="P7">Không giới hạn thời gian.</text:p>
            </text:list-item>
            <text:list-item>
              <text:p text:style-name="P7">Tự động ưu tiên 100% từ cần ôn (Overdue) trong 15 phút đầu.</text:p>
            </text:list-item>
            <text:list-item>
              <text:p text:style-name="P7">Sau 15 phút, tự động trộn từ mới (New) theo tỷ lệ 80/20.</text:p>
            </text:list-item>
          </text:list>
        </text:list-item>
        <text:list-item>
          <text:p text:style-name="P8">Chế độ Học Tập Trung (Mission):</text:p>
          <text:list>
            <text:list-item>
              <text:p text:style-name="P7">Nhận đầu vào $T$ (phút). Thiết lập lộ trình: <text:span text:style-name="T1">Khởi động</text:span> (5%) -&gt; <text:span text:style-name="T1">Học &amp; Ôn xen kẽ/Interleaving</text:span> (80%) -&gt; <text:span text:style-name="T1">Kiểm tra/Post-test</text:span> (15%).</text:p>
            </text:list-item>
          </text:list>
        </text:list-item>
      </text:list>
      <text:h text:style-name="P4" text:outline-level="3">3. QUY TẮC "atomic commit" &amp; XỬ LÝ NGẮT QUÃNG</text:h>
      <text:list text:style-name="L3">
        <text:list-item>
          <text:p text:style-name="P9"><text:span text:style-name="T2">Lưu tức thời:</text:span><text:span text:style-name="T3"> Mỗi hành động "Thuộc" hoặc "Quên" phải kích hoạt ghi đè vào </text:span><text:span text:style-name="Source_20_Text"><text:span text:style-name="T3">localStorage</text:span></text:span><text:span text:style-name="T3"> ngay lập tức.</text:span></text:p>
        </text:list-item>
        <text:list-item>
          <text:p text:style-name="P10"><text:span text:style-name="T1">Bookmark:</text:span> Luôn lưu ID của từ đang học hiện tại. Nếu tắt trình duyệt và mở lại, hệ thống phải hiển thị nút "Tiếp tục mạch học".</text:p>
        </text:list-item>
      </text:list>
      <text:h text:style-name="P4" text:outline-level="3"><text:soft-page-break/>4. CƠ CHẾ GIẢI LAO &amp; BẢO VỆ NÃO BỘ (BREAK ENGINE)</text:h>
      <text:list text:style-name="L4">
        <text:list-item>
          <text:p text:style-name="P11"><text:span text:style-name="T1">Pomodoro Thích ứng:</text:span> Cứ sau 25 phút học liên tục hoặc sau 50 thẻ, hệ thống tự động kích hoạt chế độ "Nghỉ ngơi" (Overlay màn hình, ẩn từ vựng).</text:p>
        </text:list-item>
        <text:list-item>
          <text:p text:style-name="P11"><text:span text:style-name="T1">Nghỉ ngắn/Nghỉ dài:</text:span> Cung cấp lựa chọn nghỉ 5p hoặc 15p tùy thuộc vào độ dài phiên học.</text:p>
        </text:list-item>
        <text:list-item>
          <text:p text:style-name="P11"><text:span text:style-name="T1">Chặn quá tải:</text:span> Nếu số từ đang học (Status 1) &gt; 1500 hoặc danh sách ôn hôm nay &gt; 300, hệ thống tự động vô hiệu hóa tính năng "Học từ mới" để ép người dùng phục hồi trí nhớ cũ.</text:p>
        </text:list-item>
      </text:list>
      <text:h text:style-name="P4" text:outline-level="3">5. GIAO DIỆN &amp; TRẢI NGHIỆM (UI/UX)</text:h>
      <text:list text:style-name="L5">
        <text:list-item>
          <text:p text:style-name="P12"><text:span text:style-name="T1">Công nghệ:</text:span> React (UMD), Tailwind CSS, Lucide Icons (Tất cả chạy trực tiếp trong HTML).</text:p>
        </text:list-item>
        <text:list-item>
          <text:p text:style-name="P12"><text:span text:style-name="T1">Dashboard:</text:span> Hiển thị tiến độ: Đã thuộc / Đang học / Chưa học.</text:p>
        </text:list-item>
        <text:list-item>
          <text:p text:style-name="P12"><text:span text:style-name="T1">Trạng thái trống:</text:span> Nếu chưa có dữ liệu, hiển thị khu vực Dropzone để kéo thả file CSV/JSON.</text:p>
        </text:list-item>
        <text:list-item>
          <text:p text:style-name="P12"><text:span text:style-name="T1">Nút Backup:</text:span> Luôn hiển thị nút "Xuất dữ liệu tiến độ" (JSON) để người dùng sao lưu thủ công.</text:p>
        </text:list-item>
      </text:list>
      <text:h text:style-name="P4" text:outline-level="3">6. LOGIC "CỬA SỔ TRƯỢT" (AUTO-DETECTION)</text:h>
      <text:p text:style-name="P2">Nếu người dùng không nhập thời gian:</text:p>
      <text:list text:style-name="L6">
        <text:list-item>
          <text:p text:style-name="P13">Hệ thống theo dõi thời gian thực của phiên.</text:p>
        </text:list-item>
        <text:list-item>
          <text:p text:style-name="P13">Càng học lâu, thuật toán càng tự động tăng độ khó (như yêu cầu gõ từ thay vì chỉ chọn nghĩa) để tối ưu hóa trí nhớ dài hạn.</text:p>
        </text:list-item>
      </text:list>
      <text:p text:style-name="Horizontal_20_Line"/>
      <text:p text:style-name="P3"><text:span text:style-name="T2">YÊU CẦU ĐẦU RA:</text:span><text:span text:style-name="T3"> Hãy viết lại toàn bộ mã nguồn file </text:span><text:span text:style-name="Source_20_Text"><text:span text:style-name="T3">HocTiengAnh.html</text:span></text:span><text:span text:style-name="T3"> tích hợp đầy đủ các logic trên. Code phải sạch, có chú thích các hàm xử lý SRS và logic ngắt quãng. Đảm bảo giao diện hiện đại, tinh tế và đáp ứng tốt cả trên mobil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9T16:20:52.145126800</meta:creation-date>
    <dc:date>2026-03-29T16:20:53.761961600</dc:date>
    <meta:editing-duration>PT3S</meta:editing-duration>
    <meta:editing-cycles>1</meta:editing-cycles>
    <meta:generator>LibreOffice/25.8.5.2$Windows_X86_64 LibreOffice_project/9c8b85f387cc00a89945a79c9e6239f32e450ac2</meta:generator>
    <meta:document-statistic meta:table-count="0" meta:image-count="0" meta:object-count="0" meta:page-count="2" meta:paragraph-count="34" meta:word-count="596" meta:character-count="2869" meta:non-whitespace-character-count="2329"/>
  </office:meta>
</office:document-meta>
</file>