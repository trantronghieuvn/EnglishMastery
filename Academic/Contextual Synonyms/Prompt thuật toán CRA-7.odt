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Google Sans"/>
    </style:style>
    <style:style style:name="P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6"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9"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T1" style:family="text">
      <style:text-properties style:font-name="Google Sans"/>
    </style:style>
    <style:style style:name="T2" style:family="text">
      <style:text-properties fo:font-weight="bold"/>
    </style:style>
    <style:style style:name="T3" style:family="text">
      <style:text-properties fo:font-style="italic"/>
    </style:style>
    <style:style style:name="T4" style:family="text">
      <style:text-properties officeooo:rsid="00261c14"/>
    </style:style>
    <style:style style:name="T5" style:family="text">
      <style:text-properties officeooo:rsid="00272b66"/>
    </style:style>
    <style:style style:name="T6" style:family="text">
      <style:text-properties fo:font-weight="bold" officeooo:rsid="001ca882"/>
    </style:style>
    <style:style style:name="T7" style:family="text">
      <style:text-properties officeooo:rsid="002779ed"/>
    </style:style>
    <style:style style:name="T8" style:family="text">
      <style:text-properties style:font-name="Google Sans Text" fo:font-weight="bold"/>
    </style:style>
    <style:style style:name="T9"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start text:name="__DdeLink__124_3514480185"/><text:span text:style-name="T1">The 7-Step Cross-Reflex Algorithm </text:span>CRA-7 </text:p>
      <text:h text:style-name="P1" text:outline-level="3">GIAI ĐOẠN 1: VOCATIONAL (Nền tảng từ thông dụng)</text:h>
      <text:list text:style-name="L1">
        <text:list-item>
          <text:p text:style-name="P2"><text:span text:style-name="T2">Mục tiêu:</text:span> Làm chủ 500 nhóm từ cơ bản nhất.</text:p>
        </text:list-item>
        <text:list-item>
          <text:p text:style-name="P2"><text:span text:style-name="T2">Quy trình:</text:span> Chạy từ <text:span text:style-name="T2">Bước 1 đến Bước 4</text:span>.</text:p>
          <text:list>
            <text:list-item>
              <text:p text:style-name="P2"><text:span text:style-name="T3">Trọng tâm:</text:span> Bước 4 (Nghĩa Việt đến Nói từ chính).</text:p>
            </text:list-item>
            <text:list-item>
              <text:p text:style-name="P2"><text:span text:style-name="T3">Kết quả:</text:span> Phản xạ tức thì với các từ vựng đời sống.</text:p>
            </text:list-item>
          </text:list>
        </text:list-item>
      </text:list>
      <text:p text:style-name="Horizontal_20_Line"/>
      <text:h text:style-name="P3" text:outline-level="3">GIAI ĐOẠN 2: PROFICIENT (Nâng cấp nhận diện)</text:h>
      <text:list text:style-name="L2">
        <text:list-item>
          <text:p text:style-name="P4">Phần 2.1: Học mới 500 nhóm từ tiếp theo</text:p>
          <text:list>
            <text:list-item>
              <text:p text:style-name="P5"><text:span text:style-name="T2">Quy trình:</text:span> Chạy từ <text:span text:style-name="T2">Bước 1 đến Bước 5</text:span>.</text:p>
            </text:list-item>
            <text:list-item>
              <text:p text:style-name="P5"><text:span text:style-name="T3">Bổ sung:</text:span> Bước 5 (Nhìn từ chính đến Chọn từ đồng nghĩa).</text:p>
            </text:list-item>
          </text:list>
        </text:list-item>
        <text:list-item>
          <text:p text:style-name="P4">Phần 2.2: Review Vocational (Nâng cấp 500 <text:span text:style-name="T4">nhóm</text:span> từ đầu)</text:p>
          <text:list>
            <text:list-item>
              <text:p text:style-name="P5"><text:span text:style-name="T2">Quy trình:</text:span> <text:span text:style-name="T2">Chỉ thực hiện Bước 5</text:span> cho 500 <text:span text:style-name="T5">nhóm </text:span>từ đã học ở giai đoạn 1.</text:p>
            </text:list-item>
            <text:list-item>
              <text:p text:style-name="P5"><text:span text:style-name="T3">Đề xuất tối ưu:</text:span> Sử dụng thuật toán <text:span text:style-name="T2">Interleaving</text:span> (Xen kẽ). Cứ sau khi học 50 từ mới của Proficient, app sẽ đẩy ra 20 từ cũ của Vocational để làm Bước 5. Điều này giúp não bộ liên tục phải hoán đổi giữa "nạp mới" và "nâng cấp cũ".</text:p>
            </text:list-item>
          </text:list>
        </text:list-item>
      </text:list>
      <text:p text:style-name="Horizontal_20_Line"/>
      <text:h text:style-name="P3" text:outline-level="3">GIAI ĐOẠN 3: SUPERIOR (Phản xạ chuyên sâu)</text:h>
      <text:list text:style-name="L3">
        <text:list-item>
          <text:p text:style-name="P6">Phần 3.1: Học mới các từ còn lại</text:p>
          <text:list>
            <text:list-item>
              <text:p text:style-name="P7"><text:span text:style-name="T2">Quy trình:</text:span> Chạy từ <text:span text:style-name="T2">Bước 1 </text:span><text:span text:style-name="T6">đến </text:span><text:span text:style-name="T2">Bước 6</text:span>.</text:p>
            </text:list-item>
            <text:list-item>
              <text:p text:style-name="P7"><text:span text:style-name="T3">Bổ sung:</text:span> Bước 6 (Nhìn từ đồng nghĩa đến Chọn nghĩa Việt đúng). <text:span text:style-name="T3">Lưu ý: Bạn đã chọn đổi từ "Nói nghĩa" sang "Chọn nghĩa" để làm bước đệm chống nhại.</text:span></text:p>
            </text:list-item>
          </text:list>
        </text:list-item>
        <text:list-item>
          <text:p text:style-name="P6">Phần 3.2: Review Vocational &amp; Proficient (Dịch ngược)</text:p>
          <text:list>
            <text:list-item>
              <text:p text:style-name="P7"><text:span text:style-name="T2">Quy trình:</text:span> <text:span text:style-name="T2">Chỉ thực hiện Bước 6</text:span> cho toàn bộ 1000 <text:span text:style-name="T7">nhóm</text:span> từ trước đó.</text:p>
            </text:list-item>
            <text:list-item>
              <text:p text:style-name="P7"><text:span text:style-name="T3">Đề xuất tối ưu:</text:span> Tại đây, App sẽ cấu trúc theo dạng <text:span text:style-name="T2">Challenge Mode</text:span>. App hiện từ đồng nghĩa, bạn phải chọn nghĩa nhanh trong 2 giây.</text:p>
            </text:list-item>
          </text:list>
        </text:list-item>
      </text:list>
      <text:p text:style-name="Horizontal_20_Line"/>
      <text:h text:style-name="P3" text:outline-level="3">GIAI ĐOẠN 4: MASTER (Phản xạ kép 79+)</text:h>
      <text:list text:style-name="L4">
        <text:list-item>
          <text:p text:style-name="P8"><text:span text:style-name="T2">Mục tiêu:</text:span> Chốt hạ toàn bộ hệ thống từ vựng.</text:p>
        </text:list-item>
        <text:list-item>
          <text:p text:style-name="P8"><text:span text:style-name="T2">Quy trình:</text:span> Chạy <text:span text:style-name="T2">duy nhất Bước 7</text:span> cho toàn bộ kho từ vựng.</text:p>
        </text:list-item>
        <text:list-item>
          <text:p text:style-name="P8"><text:span text:style-name="T2">Hành động:</text:span> Nghĩa Việt đến Nói: <text:span text:style-name="T2">[Từ chính] + [Từ đồng nghĩa]</text:span>.</text:p>
        </text:list-item>
        <text:list-item>
          <text:p text:style-name="P8"><text:soft-page-break/><text:span text:style-name="T2">Đề xuất cải tiến:</text:span> * <text:span text:style-name="T2">Thứ tự ngẫu nhiên (Shuffle):</text:span> Không học theo danh sách từ A-Z. Phải xáo trộn hoàn toàn để não không đoán trước được từ tiếp theo.</text:p>
          <text:list>
            <text:list-item>
              <text:p text:style-name="P9"><text:span text:style-name="T8">Batch Test:</text:span><text:span text:style-name="T9"> Chia thành các đợt 100 từ. Nếu sai bất kỳ từ nào (quên từ đồng nghĩa), từ đó bị đẩy lại Bước 6 để "nhắc nhớ" mặt chữ trước khi được quay lại Bước 7.</text:span><text:bookmark-end text:name="__DdeLink__124_3514480185"/></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9T23:48:09.448897300</meta:creation-date>
    <dc:date>2026-04-20T00:17:30.193224100</dc:date>
    <meta:editing-duration>PT8M16S</meta:editing-duration>
    <meta:editing-cycles>12</meta:editing-cycles>
    <meta:generator>LibreOffice/25.8.5.2$Windows_X86_64 LibreOffice_project/9c8b85f387cc00a89945a79c9e6239f32e450ac2</meta:generator>
    <meta:document-statistic meta:table-count="0" meta:image-count="0" meta:object-count="0" meta:page-count="2" meta:paragraph-count="26" meta:word-count="408" meta:character-count="1822" meta:non-whitespace-character-count="1460"/>
  </office:meta>
</office:document-meta>
</file>